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30000036850E2D233.png" manifest:media-type="image/png"/>
  <manifest:file-entry manifest:full-path="Pictures/10000000000005FA0000038A575FE5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3ffc1" officeooo:paragraph-rsid="0003ffc1" style:font-weight-asian="normal" style:font-weight-complex="normal"/>
    </style:style>
    <style:style style:name="P2" style:family="paragraph" style:parent-style-name="Standard">
      <style:text-properties fo:font-weight="bold" officeooo:rsid="0003ffc1" officeooo:paragraph-rsid="0003ffc1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3ff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Question 1: </text:p>
      <text:p text:style-name="Text_20_body">vehicle_maintence_scheduler <text:span text:style-name="T1">screenshot</text:span></text:p>
      <text:p text:style-name="Standard"/>
      <text:p text:style-name="Standard"><draw:frame draw:style-name="fr1" draw:name="Image1" text:anchor-type="char" svg:width="17cm" svg:height="10.067cm" draw:z-index="0"><draw:image xlink:href="Pictures/10000000000005FA0000038A575FE5FE.png" xlink:type="simple" xlink:show="embed" xlink:actuate="onLoad" draw:mime-type="image/png"/></draw:frame><text:s text:c="182"/></text:p>
      <text:p text:style-name="P1">Question 2:</text:p>
      <text:p text:style-name="P2"/>
      <text:p text:style-name="P1">Campus Notification Screenshot</text:p>
      <text:p text:style-name="P3"/>
      <text:p text:style-name="P3"><draw:frame draw:style-name="fr2" draw:name="Image2" text:anchor-type="char" svg:width="17cm" svg:height="9.733cm" draw:z-index="1"><draw:image xlink:href="Pictures/10000000000005F30000036850E2D2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5:45:55.594529818</meta:creation-date>
    <dc:date>2026-05-06T15:50:31.880925851</dc:date>
    <meta:editing-duration>PT4M38S</meta:editing-duration>
    <meta:editing-cycles>1</meta:editing-cycles>
    <meta:document-statistic meta:table-count="0" meta:image-count="2" meta:object-count="0" meta:page-count="1" meta:paragraph-count="5" meta:word-count="9" meta:character-count="273" meta:non-whitespace-character-count="85"/>
    <meta:generator>LibreOffice/26.2.1.2$Linux_X86_64 LibreOffice_project/620$Build-2</meta:generator>
  </office:meta>
</office:document-meta>
</file>